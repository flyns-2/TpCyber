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1fc2" officeooo:paragraph-rsid="001c1fc2"/>
    </style:style>
    <style:style style:name="P2" style:family="paragraph" style:parent-style-name="Standard">
      <style:text-properties officeooo:rsid="001df67a" officeooo:paragraph-rsid="001df67a"/>
    </style:style>
    <style:style style:name="P3" style:family="paragraph" style:parent-style-name="Standard">
      <style:text-properties officeooo:rsid="001f26fa" officeooo:paragraph-rsid="001f26fa"/>
    </style:style>
    <style:style style:name="P4" style:family="paragraph" style:parent-style-name="Standard">
      <style:text-properties officeooo:rsid="002001c5" officeooo:paragraph-rsid="002001c5"/>
    </style:style>
    <style:style style:name="P5" style:family="paragraph" style:parent-style-name="Standard">
      <style:text-properties officeooo:rsid="002001c5" officeooo:paragraph-rsid="0022efa2"/>
    </style:style>
    <style:style style:name="P6" style:family="paragraph" style:parent-style-name="Standard">
      <style:text-properties officeooo:rsid="0021b376" officeooo:paragraph-rsid="001f26fa"/>
    </style:style>
    <style:style style:name="P7" style:family="paragraph" style:parent-style-name="Standard">
      <style:text-properties officeooo:rsid="0021b376" officeooo:paragraph-rsid="0021b376"/>
    </style:style>
    <style:style style:name="P8" style:family="paragraph" style:parent-style-name="Standard">
      <style:text-properties officeooo:rsid="0022efa2" officeooo:paragraph-rsid="0022efa2"/>
    </style:style>
    <style:style style:name="T1" style:family="text">
      <style:text-properties officeooo:rsid="001df67a"/>
    </style:style>
    <style:style style:name="T2" style:family="text">
      <style:text-properties officeooo:rsid="002001c5"/>
    </style:style>
    <style:style style:name="T3" style:family="text">
      <style:text-properties officeooo:rsid="0022ef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r toi faire les slides :</text:p>
      <text:p text:style-name="P1"/>
      <text:p text:style-name="P2">Présentation des machines : </text:p>
      <text:p text:style-name="P2"/>
      <text:p text:style-name="P2"/>
      <text:p text:style-name="P2">Les deux machines sont sur un réseau Nat</text:p>
      <text:p text:style-name="P2"/>
      <text:p text:style-name="P1">Machine windows serveurs <text:s/>= ip : 10,0,2,15, nom de domaine <text:span text:style-name="T1">et de foret = tp.local</text:span></text:p>
      <text:p text:style-name="P1"/>
      <text:p text:style-name="P1">Mise en place d’une Gpo sur les mots de passe ainsi que sur la gestion des comptes :</text:p>
      <text:p text:style-name="P1"/>
      <text:p text:style-name="P1">Pour les mots de passes : </text:p>
      <text:p text:style-name="P1">Empecher la réutilisaiton immédiate d’anciens mdp,</text:p>
      <text:p text:style-name="P1">Le mot de passe à une date minimum de 1 jours et de 60 jours max avant d’être changer</text:p>
      <text:p text:style-name="P1">Il doit faire au minimum 14 caractères <text:s/>et nous imposons des choses spécifiques aux mdp </text:p>
      <text:p text:style-name="P1">voir photo = <text:span text:style-name="T2">gpoMdp dans jours3</text:span></text:p>
      <text:p text:style-name="P1"/>
      <text:p text:style-name="P1">pour le vérouillage de comptes :</text:p>
      <text:p text:style-name="P1">Il est bloqué pendant 15 minutes après 5 tentatives et les tentatives sont remises à 0 au bout de 15 min </text:p>
      <text:p text:style-name="P1"/>
      <text:p text:style-name="P1">voir photo = <text:s/><text:span text:style-name="T2">gpoGestionComptes dans jour 3 </text:span></text:p>
      <text:p text:style-name="P1"/>
      <text:p text:style-name="P1"/>
      <text:p text:style-name="P1">Nous avons aussi désactivé SMBv1 et réduit NTLMv1 au profit de KerBeros (la demande a l’amis en commun un peut de précision sur le pourquoi du comment)</text:p>
      <text:p text:style-name="P1"/>
      <text:p text:style-name="P1">voir photo = j3 ActivationEtDesactivationdeSmbv1NtlmV1</text:p>
      <text:p text:style-name="P1"/>
      <text:p text:style-name="P1"/>
      <text:p text:style-name="P2">la je lancerais si on a le temps le start rapport.html sur le serveur windows</text:p>
      <text:p text:style-name="P2"/>
      <text:p text:style-name="P2"/>
      <text:p text:style-name="P2">machine Kali Linux : rien de spécifique à <text:s/>donner </text:p>
      <text:p text:style-name="P1"/>
      <text:p text:style-name="P1"/>
      <text:p text:style-name="P2">Docker = a été lancé sur le pc fixe d’un membre du groupe (ici julien)</text:p>
      <text:p text:style-name="P2"/>
      <text:p text:style-name="P2"/>
      <text:p text:style-name="P2"/>
      <text:p text:style-name="P2">Pour commencer nous avons installer le service web IIS sur la windows machine, puis nous avons scané le réseau depuis la kali linux :</text:p>
      <text:p text:style-name="P2">Premier Résultat  des ports ouverts :</text:p>
      <text:p text:style-name="P2">80/tcp → Service HTTP (Microsoft IIS httpd 10.0)</text:p>
      <text:p text:style-name="P2">5985/tcp → Service HTTP (Microsoft HTTPAPI 2.0 / WinRM)</text:p>
      <text:p text:style-name="P2"/>
      <text:p text:style-name="P2"/>
      <text:p text:style-name="P2"/>
      <text:p text:style-name="P2"/>
      <text:p text:style-name="P2"/>
      <text:p text:style-name="P2"/>
      <text:p text:style-name="P2">Explication des ports </text:p>
      <text:p text:style-name="P2"><text:soft-page-break/>Le port 80 est ouvert et héberge un serveur web basé sur Microsoft IIS 10.0.</text:p>
      <text:p text:style-name="P2">Ce type de serveur est couramment utilisé sur les environnements Windows pour héberger des sites ou des applications web.</text:p>
      <text:p text:style-name="P2"/>
      <text:p text:style-name="P2">Sa présence représente un point d’entrée potentiel, notamment si des pages, fonctionnalités ou configurations sont mal sécurisées.</text:p>
      <text:p text:style-name="P2"/>
      <text:p text:style-name="P2">Administration distante (Port 5985)</text:p>
      <text:p text:style-name="P2"/>
      <text:p text:style-name="P2">Le port 5985 correspond au service WinRM (Windows Remote Management), qui permet l’administration à distance de la machine via HTTP.</text:p>
      <text:p text:style-name="P3">Voir photo = nmapScanAprèsActiveDirecoty dans jours 1</text:p>
      <text:p text:style-name="P3"/>
      <text:p text:style-name="P2"/>
      <text:p text:style-name="P2"/>
      <text:p text:style-name="P2">Analyse globale</text:p>
      <text:p text:style-name="P2"/>
      <text:p text:style-name="P2">L’analyse du scan montre que la machine cible est relativement bien protégée, avec la majorité des ports filtrés, ce qui suggère la présence d’un pare-feu actif limitant l’exposition des services.</text:p>
      <text:p text:style-name="P2"/>
      <text:p text:style-name="P2">Néanmoins, deux points d’accès restent disponibles :</text:p>
      <text:p text:style-name="P2"/>
      <text:p text:style-name="P2">un serveur web (souvent une cible prioritaire en phase de reconnaissance),</text:p>
      <text:p text:style-name="P2">un service d’administration distante (potentiellement critique en cas de mauvaise configuration).</text:p>
      <text:p text:style-name="P2"/>
      <text:p text:style-name="P2">Ces éléments indiquent que la surface d’attaque est réduite mais non négligeable.</text:p>
      <text:p text:style-name="P2"/>
      <text:p text:style-name="P2"/>
      <text:p text:style-name="P2"/>
      <text:p text:style-name="P3">Partie Vulnérabilité :</text:p>
      <text:p text:style-name="P3">Montrer à l’ écran les deux tests :</text:p>
      <text:p text:style-name="P3"/>
      <text:p text:style-name="P3">1' UNION SELECT user,password FROM users# pour l’injection sql </text:p>
      <text:p text:style-name="P7">photo = injectionSqlres dans jours2</text:p>
      <text:p text:style-name="P3"/>
      <text:p text:style-name="P3">Ce quelle fait L’injection a permis d’extraire les informations contenues dans la base de données, notamment les identifiants utilisateurs et leurs mots de passe (sous forme de hash) </text:p>
      <text:p text:style-name="P3"/>
      <text:p text:style-name="P3"/>
      <text:p text:style-name="P3"/>
      <text:p text:style-name="P8">mettre photo du score CVSS = photo = slqScoreSvssPreuve</text:p>
      <text:p text:style-name="P3">CVE : N/A (vulnérabilité générique – Injection SQL)</text:p>
      <text:p text:style-name="P7">CVSS v3.1 : 9.8 (Critique)<text:line-break/></text:p>
      <text:p text:style-name="P3"/>
      <text:p text:style-name="P3">Cette vulnérabilité permet un accès direct à la base de données sans authentification valide. Elle entraîne une fuite d’informations sensibles, notamment les identifiants utilisateurs.</text:p>
      <text:p text:style-name="P3"/>
      <text:p text:style-name="P3">Même si les mots de passe sont hashés, certains d’entre eux peuvent être facilement retrouvés via des techniques de cracking. Dans un contexte réel, ce type de faille peut mener à une compromission complète de l’application et potentiellement du système associé.</text:p>
      <text:p text:style-name="P6"/>
      <text:p text:style-name="P6"><text:soft-page-break/></text:p>
      <text:p text:style-name="P3"/>
      <text:p text:style-name="P3"/>
      <text:p text:style-name="P3">XSS réfléchit :</text:p>
      <text:p text:style-name="P3">&lt;script&gt;alert(1);&lt;/script&gt;</text:p>
      <text:p text:style-name="P8">insere la photo du resultat</text:p>
      <text:p text:style-name="P5">photo = SqlInjectionExtraction dans jours 2</text:p>
      <text:p text:style-name="P5"/>
      <text:p text:style-name="P5"/>
      <text:p text:style-name="P8">insère la photo de la preuve du score cvss :</text:p>
      <text:p text:style-name="P8">photo = xssScoreCvss dans jours 2</text:p>
      <text:p text:style-name="P4">VE : N/A (vulnérabilité générique) </text:p>
      <text:p text:style-name="P4"><text:span text:style-name="T3">CVSS : </text:span>Score : 6.1 (Moyen) </text:p>
      <text:p text:style-name="P4"/>
      <text:p text:style-name="P3"/>
      <text:p text:style-name="P3">Ce qu’elle fait : </text:p>
      <text:p text:style-name="P3">L’injection du script entraîne l’exécution immédiate de code JavaScript dans le navigateur, se traduisant par l’affichage d’une alerte.</text:p>
      <text:p text:style-name="P3"/>
      <text:p text:style-name="P3">Impact</text:p>
      <text:p text:style-name="P3"/>
      <text:p text:style-name="P3">Cette faille permet l’exécution de code côté client dans le navigateur de la victime.</text:p>
      <text:p text:style-name="P3">Elle peut être exploitée pour voler des cookies de session, rediriger l’utilisateur vers un site malveillant ou encore injecter du contenu frauduleux.</text:p>
      <text:p text:style-name="P3"/>
      <text:p text:style-name="P3"/>
      <text:p text:style-name="P3"/>
      <text:p text:style-name="P3">Tentative de correction : </text:p>
      <text:p text:style-name="P3"/>
      <text:p text:style-name="P3">montrer a l’écran le fichier login.php</text:p>
      <text:p text:style-name="P3"/>
      <text:p text:style-name="P3">Et explication : </text:p>
      <text:p text:style-name="P3"/>
      <text:p text:style-name="P3">Partie injection sql : </text:p>
      <text:p text:style-name="P3"/>
      <text:p text:style-name="P3">Dans la version initiale, la requête SQL utilisait directement les données saisies par l’utilisateur, ce qui la rendait vulnérable aux injections SQL. Un attaquant pouvait modifier la requête en injectant du code malveillant.</text:p>
      <text:p text:style-name="P3"/>
      <text:p text:style-name="P3"/>
      <text:p text:style-name="P3">La correction repose sur l’utilisation de requêtes préparées avec mysqli. Cette méthode permet de séparer la structure de la requête des données utilisateurs, ce qui empêche toute modification du comportement de la requête et sécurise l’accès à la base de données.</text:p>
      <text:p text:style-name="P3"/>
      <text:p text:style-name="P3">Partie XSS :</text:p>
      <text:p text:style-name="P3"/>
      <text:p text:style-name="P3"/>
      <text:p text:style-name="P3">Dans le code initial, les données utilisateur étaient affichées sans aucun traitement, ce qui ouvrait la possibilité d’injecter du code JavaScript dans la page.</text:p>
      <text:p text:style-name="P3"/>
      <text:p text:style-name="P3">L’ajout de la fonction htmlspecialchars() permet de transformer les caractères spéciaux en entités HTML, empêchant ainsi l’exécution de scripts malveillants dans le navigateur.</text:p>
      <text:p text:style-name="P3"><text:soft-page-break/></text:p>
      <text:p text:style-name="P3"/>
      <text:p text:style-name="P3">Parie Headers De sécurité :</text:p>
      <text:p text:style-name="P3"/>
      <text:p text:style-name="P3"/>
      <text:p text:style-name="P3">Des en-têtes HTTP ont été ajoutés afin de renforcer la sécurité globale de l’application.</text:p>
      <text:p text:style-name="P3">Ils permettent notamment de :</text:p>
      <text:p text:style-name="P3"/>
      <text:p text:style-name="P3">Bloquer l’intégration du site dans une iframe (protection contre le clickjacking)</text:p>
      <text:p text:style-name="P3">Empêcher certaines mauvaises interprétations du contenu par le navigateur</text:p>
      <text:p text:style-name="P3">Ajouter une couche de protection supplémentaire contre certaines attaques XSS</text:p>
      <text:p text:style-name="P3"/>
      <text:p text:style-name="P3"/>
      <text:p text:style-name="P3">Pas de screen on montrera le code en live</text:p>
      <text:p text:style-name="P3"/>
      <text:p text:style-name="P3"/>
      <text:p text:style-name="P3"/>
      <text:p text:style-name="P3">Partie Hardening :</text:p>
      <text:p text:style-name="P3">Pour commencer on changé le</text:p>
      <text:p text:style-name="P3"><text:tab/>. <text:s/>port shh on l’a passé de port 22 → port 2222</text:p>
      <text:p text:style-name="P3"><text:tab/>. Désactiver le root et l’autorisation par clé<text:tab/></text:p>
      <text:p text:style-name="P3"/>
      <text:p text:style-name="P3">et on activer et configurer l’ufw ainsi qu’autoriser certains services :</text:p>
      <text:p text:style-name="P3"><text:tab/>. celui du port ssh 2222</text:p>
      <text:p text:style-name="P3"><text:tab/>. le service http (web de windows servers) port 80</text:p>
      <text:p text:style-name="P3"/>
      <text:p text:style-name="P3">photo <text:s/>= <text:span text:style-name="T2">règleUfwStatus dans jours2</text:span></text:p>
      <text:p text:style-name="P3"/>
      <text:p text:style-name="P3"/>
      <text:p text:style-name="P3">Tous les autres ports <text:span text:style-name="T2">non visible sur l’image</text:span> sont bloqués par défaut, ce qui permet de réduire considérablement la surface d’attaque.</text:p>
      <text:p text:style-name="P3"/>
      <text:p text:style-name="P3"/>
      <text:p text:style-name="P4">Permission des fichiers : </text:p>
      <text:p text:style-name="P4"/>
      <text:p text:style-name="P4">ne analyse des fichiers avec permissions dangereuses a été réalisée à l’aide de la commande suivante :</text:p>
      <text:p text:style-name="P4">find / -perm 777 -type f</text:p>
      <text:p text:style-name="P4"/>
      <text:p text:style-name="P4">Aucun fichier présentant des permissions excessives n’a été détecté.</text:p>
      <text:p text:style-name="P4"/>
      <text:p text:style-name="P4"/>
      <text:p text:style-name="P4">Conclusion partie Hardening </text:p>
      <text:p text:style-name="P4"/>
      <text:p text:style-name="P4">Les mesures mises en place ont permis d’améliorer la sécurité globale du système :</text:p>
      <text:p text:style-name="P4"/>
      <text:p text:style-name="P4">Accès SSH sécurisé (clé, port modifié, root désactivé)</text:p>
      <text:p text:style-name="P4">Réduction de la surface d’attaque via le firewall</text:p>
      <text:p text:style-name="P4">Protection des fichiers sensibles</text:p>
      <text:p text:style-name="P4">Vérification des permissions et des privilèges</text:p>
      <text:p text:style-name="P4"/>
      <text:p text:style-name="P4"><text:soft-page-break/>Une surveillance régulière reste nécessaire, notamment des logs SSH, des mises à jour système, des permissions e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5T15:58:25.093000000</meta:creation-date>
    <dc:date>2026-04-15T17:06:21.923000000</dc:date>
    <meta:editing-duration>PT6M45S</meta:editing-duration>
    <meta:editing-cycles>1</meta:editing-cycles>
    <meta:document-statistic meta:table-count="0" meta:image-count="0" meta:object-count="0" meta:page-count="5" meta:paragraph-count="94" meta:word-count="1034" meta:character-count="6483" meta:non-whitespace-character-count="5511"/>
    <meta:generator>LibreOffice/24.2.3.2$Windows_X86_64 LibreOffice_project/433d9c2ded56988e8a90e6b2e771ee4e6a5ab2ba</meta:generator>
  </office:meta>
</office:document-meta>
</file>